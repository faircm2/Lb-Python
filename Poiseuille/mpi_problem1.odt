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8DE99E8D0556F16AB.png" manifest:media-type="image/png"/>
  <manifest:file-entry manifest:full-path="Pictures/1000000100000780000004186E7E27781E024F3D.png" manifest:media-type="image/png"/>
  <manifest:file-entry manifest:full-path="Pictures/100000010000078000000418B5AD7B1DECE045DB.png" manifest:media-type="image/png"/>
  <manifest:file-entry manifest:full-path="Pictures/100000010000078000000418075CE3A8632116E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3" text:anchor-type="char" svg:width="17cm" svg:height="9.278cm" draw:z-index="2"><draw:image xlink:href="Pictures/100000010000078000000418075CE3A8632116E1.png" xlink:type="simple" xlink:show="embed" xlink:actuate="onLoad" draw:mime-type="image/png"/></draw:frame><draw:frame draw:style-name="fr1" draw:name="Image4" text:anchor-type="char" svg:x="0cm" svg:y="10.308cm" svg:width="17cm" svg:height="9.278cm" draw:z-index="3"><draw:image xlink:href="Pictures/100000010000078000000418B5AD7B1DECE045DB.png" xlink:type="simple" xlink:show="embed" xlink:actuate="onLoad" draw:mime-type="image/png"/></draw:frame></text:p>
      <text:p text:style-name="P1"><draw:frame draw:style-name="fr3" draw:name="Image1" text:anchor-type="char" svg:width="17cm" svg:height="9.278cm" draw:z-index="0"><draw:image xlink:href="Pictures/1000000100000780000004186E7E27781E024F3D.png" xlink:type="simple" xlink:show="embed" xlink:actuate="onLoad" draw:mime-type="image/png"/></draw:frame><draw:frame draw:style-name="fr1" draw:name="Image2" text:anchor-type="char" svg:x="0.37cm" svg:y="10.319cm" svg:width="17cm" svg:height="9.278cm" draw:z-index="1"><draw:image xlink:href="Pictures/100000010000078000000418DE99E8D0556F16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8:19:56.360430645</meta:creation-date>
    <meta:generator>LibreOffice/7.4.7.2$Linux_X86_64 LibreOffice_project/40$Build-2</meta:generator>
    <dc:date>2025-03-04T11:37:47.140574179</dc:date>
    <meta:editing-duration>P8DT17H17M51S</meta:editing-duration>
    <meta:editing-cycles>2</meta:editing-cycles>
    <meta:document-statistic meta:table-count="0" meta:image-count="4" meta:object-count="0" meta:page-count="2" meta:paragraph-count="0" meta:word-count="0" meta:character-count="0" meta:non-whitespace-character-count="0"/>
  </office:meta>
</office:document-meta>
</file>